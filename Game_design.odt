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ca8f8" officeooo:paragraph-rsid="000ca8f8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fo:font-weight="normal" officeooo:rsid="000ca8f8" officeooo:paragraph-rsid="000ca8f8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0e1e4d" officeooo:paragraph-rsid="000e1e4d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20pt" fo:font-weight="bold" officeooo:rsid="000e1e4d" officeooo:paragraph-rsid="000e1e4d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6pt" fo:font-weight="normal" officeooo:rsid="000e4bb6" officeooo:paragraph-rsid="000e4bb6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20pt" fo:font-weight="bold" officeooo:rsid="000e4bb6" officeooo:paragraph-rsid="000e4bb6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6pt" fo:font-weight="normal" officeooo:rsid="0010272f" officeooo:paragraph-rsid="0010272f" style:font-size-asian="14pt" style:font-weight-asian="normal" style:font-size-complex="16pt" style:font-weight-complex="normal"/>
    </style:style>
    <style:style style:name="T1" style:family="text">
      <style:text-properties officeooo:rsid="000e1e4d"/>
    </style:style>
    <style:style style:name="T2" style:family="text">
      <style:text-properties officeooo:rsid="001027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re :</text:p>
      <text:p text:style-name="P1"/>
      <text:p text:style-name="P2">L’univers de IonFall se déroule dans le monde d’Ion. Il est composé de plusieurs villages mais surtout de trois grandes villes majeures : </text:p>
      <text:p text:style-name="P2"/>
      <text:p text:style-name="P2">- Feng-Bourg, une ville peuplée d’animaux modifiés par la technologie, mais gardant quand même leur esprit animal, proches de la nature.</text:p>
      <text:p text:style-name="P2"/>
      <text:p text:style-name="P2">- Vigilion, une ville ultra -tech réputée très sécuritaire avec des policiers ultra modifiés par la technologie, mais qui en réalité, abrite de nombreux criminels, en quête de défis toujours plus durs.</text:p>
      <text:p text:style-name="P2"/>
      <text:p text:style-name="P2">-Rusthaven est <text:span text:style-name="T1">une ville beaucoup plus rustique, avec un mode de vie beaucoup plus proche de notre civilisation, et qui est prête à tout pour protéger son mode de vie.</text:span></text:p>
      <text:p text:style-name="P2"/>
      <text:p text:style-name="P3">Il existe un grand conflit entre Vigilion et Rusthaven. Vigilion voulant étendre ses capacités technologiques dans tout Ion, cela a crée de sérieuses tensions avec Rusthaven, qui se sentait menacée et qui a donc décidé de rentrer en conflit en utilisant des armes technologiques volées à Vigilion. Pendant ce temps, Feng-Bourg tente de convaincre les deux villes en leur montrant qu’un compromis peut exister, un mélange entre nature et technologie, une cohésion des deux camps.</text:p>
      <text:p text:style-name="P3"/>
      <text:p text:style-name="P4">Paramètres techniques :</text:p>
      <text:p text:style-name="P4"/>
      <text:p text:style-name="P3">4v4, 2 chemins principaux, répartition 1 tank sur la lane du haut, 1 assassin en jungle et 1 DPS et un support sur la lane du bas.</text:p>
      <text:p text:style-name="P3"/>
      <text:p text:style-name="P3">L’assassin ne peut que faire des objectifs pendant un certains temps. Après ce temps il peut aller partout et aider ses coéquipier.</text:p>
      <text:p text:style-name="P3"/>
      <text:p text:style-name="P3">Passifs de rôles :</text:p>
      <text:p text:style-name="P3"/>
      <text:p text:style-name="P5">- Tank : Quand un tank fait un kill ou une assist, il gagne un petit shield, qui augmente son niveau.</text:p>
      <text:p text:style-name="P5"/>
      <text:p text:style-name="P5"><text:soft-page-break/>- Assassin : Quand il s’approche d’un ennemi avec peu d’HP, il gagne de la move speed en direction de cet ennemi.</text:p>
      <text:p text:style-name="P5"/>
      <text:p text:style-name="P5">- DPS : Au bout de 5 attaques, ils gagnent une attaque chargée qui fait plus de dégâts et donne un petit bonus de vitesse d’attaque.</text:p>
      <text:p text:style-name="P5"/>
      <text:p text:style-name="P5">- Support : Dès qu’il heal, buffe, ou shield, il donne un petit shield bonus, (cooldown conséquent qui réduit avec le ombre de heal, buffe ou debuff)</text:p>
      <text:p text:style-name="P3"/>
      <text:p text:style-name="P6">Map :</text:p>
      <text:p text:style-name="P6"/>
      <text:p text:style-name="P5">2 spaw<text:span text:style-name="T2">n :</text:span></text:p>
      <text:p text:style-name="P5"/>
      <text:p text:style-name="P5">- <text:span text:style-name="T2">Côté Vigilion : Nexus en forme de grosse salle de serveurs ou un truc comme ça, 2 inhibiteurs en forme de ??, des tourelles en forme de canons plasma</text:span></text:p>
      <text:p text:style-name="P5"/>
      <text:p text:style-name="P5">- <text:span text:style-name="T2">Côté Rusthaven : Nexus en forme d’hotel de ville ou gros batiments important, 2 ihibiteurs en forme de ??, des tourelles en forme de soit canons rustiques soit d’arbalètes.</text:span></text:p>
      <text:p text:style-name="P5"/>
      <text:p text:style-name="P7">Jungle au milieu style des deux villes avec un grand passage au milieu et un boss au centre de la map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9T17:17:24.919450469</meta:creation-date>
    <dc:date>2025-12-12T10:54:50.003593185</dc:date>
    <meta:editing-duration>PT10M7S</meta:editing-duration>
    <meta:editing-cycles>2</meta:editing-cycles>
    <meta:generator>LibreOffice/25.2.6.2$Linux_X86_64 LibreOffice_project/40d1a0e1d5bdf1afaeae24d9ece32bbb00fa66a4</meta:generator>
    <meta:document-statistic meta:table-count="0" meta:image-count="0" meta:object-count="0" meta:page-count="2" meta:paragraph-count="19" meta:word-count="421" meta:character-count="2365" meta:non-whitespace-character-count="1961"/>
  </office:meta>
</office:document-meta>
</file>